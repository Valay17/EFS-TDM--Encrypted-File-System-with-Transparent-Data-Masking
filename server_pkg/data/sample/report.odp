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svg="urn:oasis:names:tc:opendocument:xmlns:svg-compati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svg="urn:oasis:names:tc:opendocument:xmlns:svg-compatible:1.0" office:version="1.2">
  <office:automatic-styles/>
  <office:body>
    <office:presentation>
      <draw:page draw:style-name="" draw:master-page-name="">
        <draw:frame svg:width="20cm" svg:height="2cm" svg:x="2cm" svg:y="2cm">
          <draw:text-box>
            <text:p>1. Alexander Collins | SSN: 767-66-5557 | Email: tsanders@example.org | Phone: 385-799-8141 | Card: 9056 2494 8700 6700</text:p>
          </draw:text-box>
        </draw:frame>
      </draw:page>
      <draw:page draw:style-name="" draw:master-page-name="">
        <draw:frame svg:width="20cm" svg:height="2cm" svg:x="2cm" svg:y="2cm">
          <draw:text-box>
            <text:p>2. Michael Burton | SSN: 441-51-2713 | Email: terrykevin@example.net | Phone: 364-537-7744 | Card: 9117 5722 7561 1601</text:p>
          </draw:text-box>
        </draw:frame>
      </draw:page>
      <draw:page draw:style-name="" draw:master-page-name="">
        <draw:frame svg:width="20cm" svg:height="2cm" svg:x="2cm" svg:y="2cm">
          <draw:text-box>
            <text:p>3. Barbara Riggs | SSN: 190-50-5135 | Email: reedross@example.com | Phone: 531-318-7622 | Card: 9431 1018 9889 8569</text:p>
          </draw:text-box>
        </draw:frame>
      </draw:page>
      <draw:page draw:style-name="" draw:master-page-name="">
        <draw:frame svg:width="20cm" svg:height="2cm" svg:x="2cm" svg:y="2cm">
          <draw:text-box>
            <text:p>4. Matthew Smith | SSN: 155-34-9494 | Email: gshort@example.com | Phone: 570-837-9167 | Card: 8242184543355375</text:p>
          </draw:text-box>
        </draw:frame>
      </draw:page>
      <draw:page draw:style-name="" draw:master-page-name="">
        <draw:frame svg:width="20cm" svg:height="2cm" svg:x="2cm" svg:y="2cm">
          <draw:text-box>
            <text:p>5. Madison Poole | SSN: 234-46-8178 | Email: ryangross@example.net | Phone: 915-696-2989 | Card: 1472492035946091</text:p>
          </draw:text-box>
        </draw:frame>
      </draw:page>
      <draw:page draw:style-name="" draw:master-page-name="">
        <draw:frame svg:width="20cm" svg:height="2cm" svg:x="2cm" svg:y="2cm">
          <draw:text-box>
            <text:p>6. Robert Medina | SSN: 114-80-7684 | Email: umarshall@example.net | Phone: 295-430-2858 | Card: 8560292435229165</text:p>
          </draw:text-box>
        </draw:frame>
      </draw:page>
      <draw:page draw:style-name="" draw:master-page-name="">
        <draw:frame svg:width="20cm" svg:height="2cm" svg:x="2cm" svg:y="2cm">
          <draw:text-box>
            <text:p>7. Samuel Rivas | SSN: 398-75-5479 | Email: ramirezshannon@example.com | Phone: 625-694-8736 | Card: 4993-8483-3369-7284</text:p>
          </draw:text-box>
        </draw:frame>
      </draw:page>
      <draw:page draw:style-name="" draw:master-page-name="">
        <draw:frame svg:width="20cm" svg:height="2cm" svg:x="2cm" svg:y="2cm">
          <draw:text-box>
            <text:p>8. Mary Rogers | SSN: 713-75-3236 | Email: lrosales@example.com | Phone: 271-482-7798 | Card: 6568 9318 5377 1042</text:p>
          </draw:text-box>
        </draw:frame>
      </draw:page>
      <draw:page draw:style-name="" draw:master-page-name="">
        <draw:frame svg:width="20cm" svg:height="2cm" svg:x="2cm" svg:y="2cm">
          <draw:text-box>
            <text:p>9. Robert Peterson | SSN: 843-48-9022 | Email: angela83@example.org | Phone: 352-657-9824 | Card: 8935 6654 6446 9903</text:p>
          </draw:text-box>
        </draw:frame>
      </draw:page>
      <draw:page draw:style-name="" draw:master-page-name="">
        <draw:frame svg:width="20cm" svg:height="2cm" svg:x="2cm" svg:y="2cm">
          <draw:text-box>
            <text:p>10. Jason Peters | SSN: 566-51-4090 | Email: hannahbrewer@example.com | Phone: 914-444-7274 | Card: 4826773017156213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svg="urn:oasis:names:tc:opendocument:xmlns:svg-compati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svg="urn:oasis:names:tc:opendocument:xmlns:svg-compatible:1.0" office:version="1.2">
  <office:meta>
    <meta:generator>ODFPY/1.4.1</meta:generator>
  </office:meta>
</office:document-meta>
</file>