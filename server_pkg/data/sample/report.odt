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1. Frances Cardenas | SSN: 645-64-7071 | Email: emilywalker@example.org | Phone: 270-718-6590 | Card: 1207 7882 9031 2729</text:p>
      <text:p>2. Angel Riggs | SSN: 470-91-8532 | Email: gibsonolivia@example.net | Phone: 924-356-8135 | Card: 3885 9548 5425 9817</text:p>
      <text:p>3. Michael Snyder | SSN: 576-65-5397 | Email: dylanwatts@example.org | Phone: 530-451-2419 | Card: 5569838549958613</text:p>
      <text:p>4. Colleen Brock | SSN: 724-95-7209 | Email: pwilliams@example.org | Phone: 544-229-9098 | Card: 6325 3979 8988 4475</text:p>
      <text:p>5. Robert Contreras | SSN: 916-43-6576 | Email: stephanie79@example.net | Phone: 486-810-5526 | Card: 1166-9464-4130-2402</text:p>
      <text:p>6. Jessica Meadows | SSN: 837-62-9004 | Email: vmerritt@example.com | Phone: 768-976-4937 | Card: 8800-9041-8342-1282</text:p>
      <text:p>7. Paul Larsen | SSN: 401-38-7625 | Email: katie87@example.net | Phone: 908-449-6016 | Card: 7046 8753 9698 6632</text:p>
      <text:p>8. Jeremiah Reeves | SSN: 863-80-6419 | Email: josephflores@example.net | Phone: 560-919-8434 | Card: 5438-6023-5118-4777</text:p>
      <text:p>9. Chris Reyes | SSN: 838-34-6169 | Email: jasminebrown@example.com | Phone: 322-960-9779 | Card: 4033 4138 4545 8933</text:p>
      <text:p>10. John Brown | SSN: 841-85-9595 | Email: xprice@example.net | Phone: 811-489-2647 | Card: 4180-5853-4727-6912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