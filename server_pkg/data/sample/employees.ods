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 table:name="Employees">
        <table:table-row>
          <table:table-cell>
            <text:p>id</text:p>
          </table:table-cell>
          <table:table-cell>
            <text:p>name</text:p>
          </table:table-cell>
          <table:table-cell>
            <text:p>ssn</text:p>
          </table:table-cell>
          <table:table-cell>
            <text:p>email</text:p>
          </table:table-cell>
          <table:table-cell>
            <text:p>phone</text:p>
          </table:table-cell>
          <table:table-cell>
            <text:p>credit_card</text:p>
          </table:table-cell>
          <table:table-cell>
            <text:p>salary</text:p>
          </table:table-cell>
        </table:table-row>
        <table:table-row>
          <table:table-cell>
            <text:p>1</text:p>
          </table:table-cell>
          <table:table-cell>
            <text:p>Alicia Gilmore</text:p>
          </table:table-cell>
          <table:table-cell>
            <text:p>409-11-9751</text:p>
          </table:table-cell>
          <table:table-cell>
            <text:p>wwoods@example.com</text:p>
          </table:table-cell>
          <table:table-cell>
            <text:p>329-480-1745</text:p>
          </table:table-cell>
          <table:table-cell>
            <text:p>1893-5786-3068-9042</text:p>
          </table:table-cell>
          <table:table-cell>
            <text:p>41607</text:p>
          </table:table-cell>
        </table:table-row>
        <table:table-row>
          <table:table-cell>
            <text:p>2</text:p>
          </table:table-cell>
          <table:table-cell>
            <text:p>Sarah Ashley</text:p>
          </table:table-cell>
          <table:table-cell>
            <text:p>687-46-8690</text:p>
          </table:table-cell>
          <table:table-cell>
            <text:p>vmedina@example.net</text:p>
          </table:table-cell>
          <table:table-cell>
            <text:p>690-651-6582</text:p>
          </table:table-cell>
          <table:table-cell>
            <text:p>4020-1841-5136-8827</text:p>
          </table:table-cell>
          <table:table-cell>
            <text:p>147756</text:p>
          </table:table-cell>
        </table:table-row>
        <table:table-row>
          <table:table-cell>
            <text:p>3</text:p>
          </table:table-cell>
          <table:table-cell>
            <text:p>Stephanie Freeman</text:p>
          </table:table-cell>
          <table:table-cell>
            <text:p>166-61-9056</text:p>
          </table:table-cell>
          <table:table-cell>
            <text:p>ryan06@example.com</text:p>
          </table:table-cell>
          <table:table-cell>
            <text:p>275-790-1878</text:p>
          </table:table-cell>
          <table:table-cell>
            <text:p>3485-3444-5978-2395</text:p>
          </table:table-cell>
          <table:table-cell>
            <text:p>55525</text:p>
          </table:table-cell>
        </table:table-row>
        <table:table-row>
          <table:table-cell>
            <text:p>4</text:p>
          </table:table-cell>
          <table:table-cell>
            <text:p>Rebecca Ramsey</text:p>
          </table:table-cell>
          <table:table-cell>
            <text:p>671-63-4697</text:p>
          </table:table-cell>
          <table:table-cell>
            <text:p>ncalhoun@example.net</text:p>
          </table:table-cell>
          <table:table-cell>
            <text:p>994-735-7232</text:p>
          </table:table-cell>
          <table:table-cell>
            <text:p>8381 8253 5871 8025</text:p>
          </table:table-cell>
          <table:table-cell>
            <text:p>114531</text:p>
          </table:table-cell>
        </table:table-row>
        <table:table-row>
          <table:table-cell>
            <text:p>5</text:p>
          </table:table-cell>
          <table:table-cell>
            <text:p>James Elliott</text:p>
          </table:table-cell>
          <table:table-cell>
            <text:p>735-17-2625</text:p>
          </table:table-cell>
          <table:table-cell>
            <text:p>millerroy@example.com</text:p>
          </table:table-cell>
          <table:table-cell>
            <text:p>981-412-4457</text:p>
          </table:table-cell>
          <table:table-cell>
            <text:p>5335-2330-3573-4929</text:p>
          </table:table-cell>
          <table:table-cell>
            <text:p>112350</text:p>
          </table:table-cell>
        </table:table-row>
        <table:table-row>
          <table:table-cell>
            <text:p>6</text:p>
          </table:table-cell>
          <table:table-cell>
            <text:p>David Murphy</text:p>
          </table:table-cell>
          <table:table-cell>
            <text:p>176-30-1043</text:p>
          </table:table-cell>
          <table:table-cell>
            <text:p>wmurphy@example.com</text:p>
          </table:table-cell>
          <table:table-cell>
            <text:p>618-661-8699</text:p>
          </table:table-cell>
          <table:table-cell>
            <text:p>5771153447925720</text:p>
          </table:table-cell>
          <table:table-cell>
            <text:p>77056</text:p>
          </table:table-cell>
        </table:table-row>
        <table:table-row>
          <table:table-cell>
            <text:p>7</text:p>
          </table:table-cell>
          <table:table-cell>
            <text:p>Trevor Fisher</text:p>
          </table:table-cell>
          <table:table-cell>
            <text:p>819-68-2166</text:p>
          </table:table-cell>
          <table:table-cell>
            <text:p>ruizkaitlyn@example.org</text:p>
          </table:table-cell>
          <table:table-cell>
            <text:p>903-439-5334</text:p>
          </table:table-cell>
          <table:table-cell>
            <text:p>4241-7965-2880-9922</text:p>
          </table:table-cell>
          <table:table-cell>
            <text:p>124886</text:p>
          </table:table-cell>
        </table:table-row>
        <table:table-row>
          <table:table-cell>
            <text:p>8</text:p>
          </table:table-cell>
          <table:table-cell>
            <text:p>Mrs. Marie Harrington DDS</text:p>
          </table:table-cell>
          <table:table-cell>
            <text:p>252-44-3330</text:p>
          </table:table-cell>
          <table:table-cell>
            <text:p>herringjames@example.org</text:p>
          </table:table-cell>
          <table:table-cell>
            <text:p>273-261-3718</text:p>
          </table:table-cell>
          <table:table-cell>
            <text:p>6039 5728 8195 3037</text:p>
          </table:table-cell>
          <table:table-cell>
            <text:p>130266</text:p>
          </table:table-cell>
        </table:table-row>
        <table:table-row>
          <table:table-cell>
            <text:p>9</text:p>
          </table:table-cell>
          <table:table-cell>
            <text:p>Cynthia Wells</text:p>
          </table:table-cell>
          <table:table-cell>
            <text:p>411-99-7594</text:p>
          </table:table-cell>
          <table:table-cell>
            <text:p>elliottjeffery@example.net</text:p>
          </table:table-cell>
          <table:table-cell>
            <text:p>478-712-9847</text:p>
          </table:table-cell>
          <table:table-cell>
            <text:p>9090 8172 2317 1653</text:p>
          </table:table-cell>
          <table:table-cell>
            <text:p>136276</text:p>
          </table:table-cell>
        </table:table-row>
        <table:table-row>
          <table:table-cell>
            <text:p>10</text:p>
          </table:table-cell>
          <table:table-cell>
            <text:p>Jacob Obrien</text:p>
          </table:table-cell>
          <table:table-cell>
            <text:p>430-87-5102</text:p>
          </table:table-cell>
          <table:table-cell>
            <text:p>stricklandfrank@example.com</text:p>
          </table:table-cell>
          <table:table-cell>
            <text:p>226-293-4750</text:p>
          </table:table-cell>
          <table:table-cell>
            <text:p>1339 5415 1659 3870</text:p>
          </table:table-cell>
          <table:table-cell>
            <text:p>108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